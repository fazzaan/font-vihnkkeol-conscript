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TT" svg:font-family="LT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TT" fo:font-size="74pt" officeooo:rsid="0006fc7c" officeooo:paragraph-rsid="0006fc7c" style:font-size-asian="74pt" style:font-size-complex="74pt"/>
    </style:style>
    <style:style style:name="P2" style:family="paragraph" style:parent-style-name="Standard">
      <style:paragraph-properties fo:break-before="page"/>
      <style:text-properties style:font-name="LTT" fo:font-size="40pt" officeooo:rsid="0006fc7c" officeooo:paragraph-rsid="0006fc7c" style:font-size-asian="40pt" style:font-size-complex="40pt"/>
    </style:style>
    <style:style style:name="P3" style:family="paragraph" style:parent-style-name="Standard">
      <style:text-properties style:font-name="LTT" fo:font-size="40pt" officeooo:rsid="0006fc7c" officeooo:paragraph-rsid="0006fc7c" style:font-size-asian="40pt" style:font-size-complex="40pt"/>
    </style:style>
    <style:style style:name="T1" style:family="text">
      <style:text-properties officeooo:rsid="000765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ko dim pI tU o<text:span text:style-name="T1">l bon los of e fI E Son. </text:span></text:p>
      <text:p text:style-name="P2">eC sa not Zel dE SUl tem an yU kas du.</text:p>
      <text:p text:style-name="P3">vA sa SUl Tit fUn ze. </text:p>
      <text:p text:style-name="P3"/>
      <text:p text:style-name="P3">eC-sa-not Zel-dE-SUl tem-an yU-kas-du.</text:p>
      <text:p text:style-name="P3">vA-sa-SUl Tit fUn-ze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TT" svg:font-family="LT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ejaVu Sans1" style:font-size-complex="12pt" style:language-complex="ug" style:country-complex="C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ejaVu Sans1" style:font-size-complex="12pt" style:language-complex="ug" style:country-complex="C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tb-lr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1T00:29:48.189523068</meta:creation-date>
    <dc:date>2026-04-01T01:18:07.101721878</dc:date>
    <meta:editing-duration>PT20M18S</meta:editing-duration>
    <meta:editing-cycles>4</meta:editing-cycles>
    <meta:generator>LibreOffice/25.8.6.2$Linux_X86_64 LibreOffice_project/580$Build-2</meta:generator>
    <meta:document-statistic meta:table-count="0" meta:image-count="0" meta:object-count="0" meta:page-count="2" meta:paragraph-count="5" meta:word-count="37" meta:character-count="161" meta:non-whitespace-character-count="126"/>
  </office:meta>
</office:document-meta>
</file>